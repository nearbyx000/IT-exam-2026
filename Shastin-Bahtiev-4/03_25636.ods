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Fira Sans" svg:font-family="'Fir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402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9374in"/>
    </style:style>
    <style:style style:name="co10" style:family="table-column">
      <style:table-column-properties fo:break-before="auto" style:column-width="1.6874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1.198in"/>
    </style:style>
    <style:style style:name="co13" style:family="table-column">
      <style:table-column-properties fo:break-before="auto" style:column-width="1.948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611in" fo:break-before="auto" style:use-optimal-row-height="true"/>
    </style:style>
    <style:style style:name="ta1" style:family="table" style:master-page-name="PageStyle_5f_Движение_5f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_товаров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16377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Количество упаковок</text:p>
          </table:table-cell>
          <table:table-cell table:style-name="ce1" office:value-type="string" calcext:value-type="string">
            <text:p>Цена 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6/01/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6/02/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5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5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4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6/03/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6/04/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6/07/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6/08/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2" table:number-columns-repeated="16377"/>
        </table:table-row>
        <table:table-row table:style-name="ro2" table:number-rows-repeated="1046302">
          <table:table-cell table:number-columns-repeated="7"/>
          <table:table-cell table:style-name="ce2" table:number-columns-repeated="16377"/>
        </table:table-row>
        <table:table-row table:style-name="ro2">
          <table:table-cell table:number-columns-repeated="7"/>
          <table:table-cell table:style-name="ce2" table:number-columns-repeated="16377"/>
        </table:table-row>
      </table:table>
      <table:table table:name="Товар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6378"/>
        <table:table-row table:style-name="ro6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Единица измерения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роизводитель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Экопродукты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Молокозавод №1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олокозавод №2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Молокозавод №1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олокозавод №1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Молокозавод №2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Молокозавод №2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Экопродукты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Экопродукты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Молокозавод №2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Молокозавод №1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Молокозавод №1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акаронная фабрик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акаронная фабрик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акаронная фабрик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акаронная фабрик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Экопродукты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Экопродукты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Продбаза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"Чай-кофе-сахар"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Мясокомбинат</text:p>
          </table:table-cell>
          <table:table-cell table:style-name="ce2" table:number-columns-repeated="16378"/>
        </table:table-row>
        <table:table-row table:style-name="ro2" table:number-rows-repeated="1048510">
          <table:table-cell table:number-columns-repeated="6"/>
          <table:table-cell table:style-name="ce2" table:number-columns-repeated="16378"/>
        </table:table-row>
        <table:table-row table:style-name="ro2">
          <table:table-cell table:number-columns-repeated="6"/>
          <table:table-cell table:style-name="ce2" table:number-columns-repeated="16378"/>
        </table:table-row>
      </table:table>
      <table:table table:name="Магазин" table:style-name="ta3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81"/>
        <table:table-row table:style-name="ro2">
          <table:table-cell table:style-name="ce7" office:value-type="string" calcext:value-type="string">
            <text:p>ID магазина</text:p>
          </table:table-cell>
          <table:table-cell table:style-name="ce7" office:value-type="string" calcext:value-type="string">
            <text:p>Район</text:p>
          </table:table-cell>
          <table:table-cell table:style-name="ce7" office:value-type="string" calcext:value-type="string">
            <text:p>Адрес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style-name="ce2" table:number-columns-repeated="16381"/>
        </table:table-row>
        <table:table-row table:style-name="ro2">
          <table:table-cell table:style-name="ce4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style-name="ce2" table:number-columns-repeated="16381"/>
        </table:table-row>
        <table:table-row table:style-name="ro2">
          <table:table-cell table:style-name="ce4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style-name="ce2" table:number-columns-repeated="16381"/>
        </table:table-row>
        <table:table-row table:style-name="ro2">
          <table:table-cell table:style-name="ce4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style-name="ce2" table:number-columns-repeated="16381"/>
        </table:table-row>
        <table:table-row table:style-name="ro2" table:visibility="filter">
          <table:table-cell table:style-name="ce4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style-name="ce2" table:number-columns-repeated="16381"/>
        </table:table-row>
        <table:table-row table:style-name="ro2">
          <table:table-cell table:style-name="ce4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style-name="ce2" table:number-columns-repeated="16381"/>
        </table:table-row>
        <table:table-row table:style-name="ro2" table:number-rows-repeated="1048558">
          <table:table-cell table:number-columns-repeated="3"/>
          <table:table-cell table:style-name="ce2" table:number-columns-repeated="16381"/>
        </table:table-row>
        <table:table-row table:style-name="ro2">
          <table:table-cell table:number-columns-repeated="3"/>
          <table:table-cell table:style-name="ce2" table:number-columns-repeated="16381"/>
        </table:table-row>
      </table:table>
      <table:named-expressions/>
      <table:database-ranges>
        <table:database-range table:name="__Anonymous_Sheet_DB__0" table:target-range-address="Движение_товаров.A1:Движение_товаров.G2273" table:display-filter-buttons="true">
          <table:filter>
            <table:filter-and>
              <table:filter-condition table:value="M12" table:operator="=" table:field-number="2">
                <table:filter-set-item table:value="M12"/>
                <table:filter-set-item table:value="M13"/>
                <table:filter-set-item table:value="M16"/>
                <table:filter-set-item table:value="M2"/>
              </table:filter-condition>
              <table:filter-condition table:value="Поступление" table:operator="=" table:field-number="4"/>
              <table:filter-condition table:value="21" table:operator="=" table:field-number="3">
                <table:filter-set-item table:value="21"/>
                <table:filter-set-item table:value="22"/>
                <table:filter-set-item table:value="23"/>
              </table:filter-condition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Бурый рис" table:operator="=" table:field-number="2">
                <table:filter-set-item table:value="Бурый рис"/>
                <table:filter-set-item table:value="Рис длиннозерный"/>
                <table:filter-set-item table:value="Рис круглозерный"/>
              </table:filter-condition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Мартеновская, 2" table:operator="=" table:field-number="2">
                <table:filter-set-item table:value="Мартеновская, 2"/>
                <table:filter-set-item table:value="Мартеновская, 36"/>
                <table:filter-set-item table:value="ул. Металлургов, 12"/>
                <table:filter-set-item table:value="ул. Металлургов. 2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Fira Sans" svg:font-family="'Fir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1:01:13.7025965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вижение_5f_товаров" style:display-name="PageStyle_Движение_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7-09T17:04:06</meta:creation-date>
    <meta:initial-creator>Слава</meta:initial-creator>
    <dc:language>ru-RU</dc:language>
    <dc:date>2026-04-29T11:09:01.837102986</dc:date>
    <meta:editing-cycles>1</meta:editing-cycles>
    <meta:editing-duration>PT7M48S</meta:editing-duration>
    <meta:generator>LibreOffice/26.2.2.2$Linux_X86_64 LibreOffice_project/c459f746614306d6c3c6a8c8bf931ecabb6c7513</meta:generator>
    <meta:document-statistic meta:table-count="3" meta:cell-count="16352" meta:object-count="0"/>
    <meta:user-defined meta:name="AppVersion">15.0000</meta:user-defined>
  </office:meta>
</office:document-meta>
</file>